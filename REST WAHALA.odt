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officeooo:rsid="001878a0" officeooo:paragraph-rsid="001878a0"/>
    </style:style>
    <style:style style:name="T1" style:family="text">
      <style:text-properties officeooo:rsid="001878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99688a6d-7fff-7236-c1fd-70941b964665"/></text:p>
      <text:p text:style-name="Standard"/>
      <text:p text:style-name="P4">COMPILED LISTS BY BYTE</text:p>
      <text:p text:style-name="Standard"/>
      <text:p text:style-name="Standard">List 1: Links</text:p>
      <text:p text:style-name="Standard"/>
      <text:list text:style-name="L1">
        <text:list-item>
          <text:p text:style-name="P1">DTO (Data Transfer Object)</text:p>
        </text:list-item>
        <text:list-item>
          <text:p text:style-name="P1">Pattern Matching for switch</text:p>
        </text:list-item>
        <text:list-item>
          <text:p text:style-name="P1">Clean Coder (blog)</text:p>
        </text:list-item>
        <text:list-item>
          <text:p text:style-name="P1">Null references (billion-dollar mistake)</text:p>
        </text:list-item>
        <text:list-item>
          <text:p text:style-name="P1">JAVA DOCS (D.S.)</text:p>
        </text:list-item>
        <text:list-item>
          <text:p text:style-name="P1">Code walks (Video)</text:p>
        </text:list-item>
        <text:list-item>
          <text:p text:style-name="P1">Clean code (Videos)</text:p>
        </text:list-item>
        <text:list-item>
          <text:p text:style-name="P1">Design pattern (OOP)</text:p>
        </text:list-item>
      </text:list>
      <text:p text:style-name="Standard"><text:s text:c="4"/></text:p>
      <text:p text:style-name="Standard"><text:s text:c="4"/></text:p>
      <text:p text:style-name="Standard">List 2: Books</text:p>
      <text:p text:style-name="Standard"/>
      <text:list text:style-name="L2">
        <text:list-item>
          <text:p text:style-name="P2">Software architecture pattern</text:p>
        </text:list-item>
        <text:list-item>
          <text:p text:style-name="P2">Nuban Proposal</text:p>
        </text:list-item>
        <text:list-item>
          <text:p text:style-name="P2">TDD by Kent (Test-Driven Development by Kent Beck)</text:p>
        </text:list-item>
        <text:list-item>
          <text:p text:style-name="P2">Object Design, Roles, Responsibilities and Collaboration</text:p>
        </text:list-item>
        <text:list-item>
          <text:p text:style-name="P2">Laws of Demeter</text:p>
        </text:list-item>
        <text:list-item>
          <text:p text:style-name="P2">Design of everyday things</text:p>
        </text:list-item>
        <text:list-item>
          <text:p text:style-name="P2"><text:span text:style-name="T1">The </text:span>Clean Code</text:p>
        </text:list-item>
        <text:list-item>
          <text:p text:style-name="P2">Clean Coder</text:p>
        </text:list-item>
        <text:list-item>
          <text:p text:style-name="P2">Clean Architecture</text:p>
        </text:list-item>
        <text:list-item>
          <text:p text:style-name="P2">Head First: Object Oriented A&amp;D (Analysis and Design)</text:p>
        </text:list-item>
        <text:list-item>
          <text:p text:style-name="P2">UML classroom</text:p>
        </text:list-item>
        <text:list-item>
          <text:p text:style-name="P2">Common Sense guide to DS and Algorithm</text:p>
        </text:list-item>
        <text:list-item>
          <text:p text:style-name="P2">Grokking algorithm</text:p>
        </text:list-item>
        <text:list-item>
          <text:p text:style-name="P2">Think like programmer</text:p>
        </text:list-item>
        <text:list-item>
          <text:p text:style-name="P2">Deitel 889 (Likely referring to a Deitel &amp; Deitel textbook)</text:p>
        </text:list-item>
        <text:list-item>
          <text:p text:style-name="P2">O.A. Design (Slides) (Object-Oriented Analysis Design)</text:p>
        </text:list-item>
      </text:list>
      <text:p text:style-name="Standard"><text:s text:c="4"/></text:p>
      <text:p text:style-name="Standard"><text:s text:c="4"/></text:p>
      <text:p text:style-name="Standard">Tasks List:</text:p>
      <text:p text:style-name="Standard"/>
      <text:list text:style-name="L3">
        <text:list-item>
          <text:p text:style-name="P3">Diary — Use Case</text:p>
        </text:list-item>
        <text:list-item>
          <text:p text:style-name="P3">Account</text:p>
        </text:list-item>
        <text:list-item>
          <text:p text:style-name="P3">Bike</text:p>
        </text:list-item>
        <text:list-item>
          <text:p text:style-name="P3">AC</text:p>
        </text:list-item>
        <text:list-item>
          <text:p text:style-name="P3">Uni Records</text:p>
        </text:list-item>
        <text:list-item>
          <text:p text:style-name="P3">Movie Rating</text:p>
        </text:list-item>
        <text:list-item>
          <text:p text:style-name="P3">e-Store</text:p>
        </text:list-item>
        <text:list-item>
          <text:p text:style-name="P3">Pizza Wahala</text:p>
        </text:list-item>
        <text:list-item>
          <text:p text:style-name="P3">Back to sender</text:p>
        </text:list-item>
        <text:list-item>
          <text:p text:style-name="P3">Problems</text:p>
        </text:list-item>
        <text:list-item>
          <text:p text:style-name="P3">Geopolitical Zones</text:p>
        </text:list-item>
        <text:list-item>
          <text:p text:style-name="P3">Reflectio<text:span text:style-name="T1">n</text:span></text:p>
        </text:list-item>
        <text:list-item>
          <text:p text:style-name="P3">Book sug<text:span text:style-name="T1">g</text:span>estion System</text:p>
        </text:list-item>
        <text:list-item>
          <text:p text:style-name="P3">D.S. (Python &amp; Java)</text:p>
        </text:list-item>
        <text:list-item>
          <text:p text:style-name="P3"><text:soft-page-break/>Credit Card</text:p>
        </text:list-item>
        <text:list-item>
          <text:p text:style-name="P3">Transaction Log</text:p>
        </text:list-item>
      </text:list>
      <text:p text:style-name="Standard"/>
      <text:list text:continue-numbering="true" text:style-name="L3">
        <text:list-item>
          <text:p text:style-name="P3"><text:s text:c="4"/>Cisa Cipher (Likely Caesar Cipher)</text:p>
        </text:list-item>
        <text:list-item>
          <text:p text:style-name="P3"><text:s text:c="4"/>Number Guessing</text:p>
        </text:list-item>
        <text:list-item>
          <text:p text:style-name="P3"><text:s text:c="4"/>Parking System</text:p>
        </text:list-item>
        <text:list-item>
          <text:p text:style-name="P3"><text:s text:c="4"/>Simple arithmetic</text:p>
        </text:list-item>
        <text:list-item>
          <text:p text:style-name="P3"><text:s text:c="4"/>Student Grad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23:17:21.302445668</meta:creation-date>
    <dc:date>2026-04-28T16:51:04.207234543</dc:date>
    <meta:editing-duration>PT3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3" meta:word-count="199" meta:character-count="1158" meta:non-whitespace-character-count="1016"/>
  </office:meta>
</office:document-meta>
</file>